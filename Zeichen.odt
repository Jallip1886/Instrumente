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400000024866ED9AB54CF082A.png" manifest:media-type="image/png"/>
  <manifest:file-entry manifest:full-path="Pictures/10000001000000250000002584AA534C1F59157C.png" manifest:media-type="image/png"/>
  <manifest:file-entry manifest:full-path="Pictures/10000280000003D3000003D345A18774B9184706.svg" manifest:media-type="image/svg+xml"/>
  <manifest:file-entry manifest:full-path="Pictures/10000233000003B9000003B9BACDF059D4E5A028.svg" manifest:media-type="image/svg+xml"/>
  <manifest:file-entry manifest:full-path="Pictures/10000000000000AE000000BA6428F10425F0D8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c1148" officeooo:paragraph-rsid="001c114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a9ee3" officeooo:paragraph-rsid="001a9ee3" style:font-size-asian="15.75pt" style:font-weight-asian="bold" style:font-size-complex="18pt" style:font-weight-complex="bold"/>
    </style:style>
    <style:style style:name="P3" style:family="paragraph" style:parent-style-name="Text_20_body">
      <style:text-properties officeooo:paragraph-rsid="001a9ee3"/>
    </style:style>
    <style:style style:name="P4" style:family="paragraph" style:parent-style-name="Standard">
      <style:text-properties officeooo:paragraph-rsid="001a9ee3"/>
    </style:style>
    <style:style style:name="P5" style:family="paragraph" style:parent-style-name="Heading_20_3">
      <style:text-properties officeooo:paragraph-rsid="001b41f2"/>
    </style:style>
    <style:style style:name="P6" style:family="paragraph" style:parent-style-name="Horizontal_20_Line">
      <style:text-properties fo:font-size="12pt" officeooo:rsid="001cfe47" officeooo:paragraph-rsid="001cfe47" style:font-size-asian="12pt" style:font-size-complex="12pt"/>
    </style:style>
    <style:style style:name="P7" style:family="paragraph" style:parent-style-name="Standard">
      <style:text-properties fo:font-size="12pt" fo:font-weight="bold" officeooo:rsid="001a9ee3" officeooo:paragraph-rsid="001a9ee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446f2a" officeooo:paragraph-rsid="00446f2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a9ee3" officeooo:paragraph-rsid="00446f2a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officeooo:paragraph-rsid="001c1148"/>
    </style:style>
    <style:style style:name="P14" style:family="paragraph" style:parent-style-name="Preformatted_20_Text">
      <style:paragraph-properties style:writing-mode="lr-tb"/>
      <style:text-properties officeooo:paragraph-rsid="001c1148"/>
    </style:style>
    <style:style style:name="P15" style:family="paragraph" style:parent-style-name="Text_20_body">
      <style:text-properties officeooo:paragraph-rsid="001c1148"/>
    </style:style>
    <style:style style:name="P16" style:family="paragraph" style:parent-style-name="Text_20_body">
      <style:text-properties officeooo:paragraph-rsid="001dfad0"/>
    </style:style>
    <style:style style:name="P17" style:family="paragraph" style:parent-style-name="Standard">
      <style:text-properties officeooo:paragraph-rsid="001febcf"/>
    </style:style>
    <style:style style:name="P18" style:family="paragraph" style:parent-style-name="Text_20_body">
      <style:text-properties style:font-name="Liberation Serif" fo:font-size="12pt" officeooo:paragraph-rsid="0028a75a" style:font-size-asian="12pt" style:font-size-complex="12pt"/>
    </style:style>
    <style:style style:name="P19" style:family="paragraph" style:parent-style-name="Text_20_body">
      <style:text-properties officeooo:paragraph-rsid="002cc85c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290b09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328738"/>
    </style:style>
    <style:style style:name="P22" style:family="paragraph" style:parent-style-name="Standard">
      <style:text-properties officeooo:paragraph-rsid="002f2cd2"/>
    </style:style>
    <style:style style:name="P23" style:family="paragraph" style:parent-style-name="Standard">
      <style:paragraph-properties style:writing-mode="lr-tb"/>
      <style:text-properties officeooo:paragraph-rsid="0039b5a8"/>
    </style:style>
    <style:style style:name="P24" style:family="paragraph" style:parent-style-name="Text_20_body">
      <style:text-properties officeooo:paragraph-rsid="0019fc9b"/>
    </style:style>
    <style:style style:name="P25" style:family="paragraph" style:parent-style-name="Text_20_body">
      <style:text-properties officeooo:paragraph-rsid="003b30a5"/>
    </style:style>
    <style:style style:name="P26" style:family="paragraph" style:parent-style-name="Standard">
      <style:text-properties officeooo:paragraph-rsid="003ee605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290b09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>
      <style:text-properties officeooo:paragraph-rsid="0047e8cf"/>
    </style:style>
    <style:style style:name="T1" style:family="text">
      <style:text-properties officeooo:rsid="001803bb"/>
    </style:style>
    <style:style style:name="T2" style:family="text">
      <style:text-properties officeooo:rsid="0019fc9b"/>
    </style:style>
    <style:style style:name="T3" style:family="text">
      <style:text-properties officeooo:rsid="001a9ee3"/>
    </style:style>
    <style:style style:name="T4" style:family="text">
      <style:text-properties officeooo:rsid="001b070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a9ee3" style:font-size-asian="12pt" style:font-size-complex="12pt"/>
    </style:style>
    <style:style style:name="T7" style:family="text">
      <style:text-properties fo:font-size="12pt" officeooo:rsid="003b8b0f" style:font-size-asian="12pt" style:font-size-complex="12pt"/>
    </style:style>
    <style:style style:name="T8" style:family="text">
      <style:text-properties fo:font-size="12pt" fo:font-weight="normal" officeooo:rsid="001b41f2" style:font-size-asian="12pt" style:font-weight-asian="normal" style:font-size-complex="12pt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c1148" style:font-size-asian="12pt" style:font-size-complex="12pt"/>
    </style:style>
    <style:style style:name="T12" style:family="text">
      <style:text-properties style:font-name="Liberation Serif" fo:font-size="12pt" officeooo:rsid="002e782a" style:font-size-asian="12pt" style:font-size-complex="12pt"/>
    </style:style>
    <style:style style:name="T13" style:family="text">
      <style:text-properties style:font-name="Liberation Serif" fo:font-size="12pt" officeooo:rsid="003424c0" style:font-size-asian="12pt" style:font-size-complex="12pt"/>
    </style:style>
    <style:style style:name="T14" style:family="text">
      <style:text-properties style:font-name="Liberation Serif" fo:font-size="12pt" officeooo:rsid="00382696" style:font-size-asian="12pt" style:font-size-complex="12pt"/>
    </style:style>
    <style:style style:name="T15" style:family="text">
      <style:text-properties style:font-name="Liberation Serif" fo:font-size="12pt" officeooo:rsid="004194e2" style:font-size-asian="12pt" style:font-size-complex="12pt"/>
    </style:style>
    <style:style style:name="T16" style:family="text">
      <style:text-properties style:font-name="Liberation Serif" fo:font-size="12pt" officeooo:rsid="0047e8cf" style:font-size-asian="12pt" style:font-size-complex="12pt"/>
    </style:style>
    <style:style style:name="T17" style:family="text">
      <style:text-properties style:font-name="Liberation Serif" fo:font-size="12pt" fo:font-style="normal" officeooo:rsid="0047e8cf" style:font-size-asian="12pt" style:font-style-asian="normal" style:font-size-complex="12pt" style:font-style-complex="normal"/>
    </style:style>
    <style:style style:name="T18" style:family="text">
      <style:text-properties style:font-name="Liberation Serif" officeooo:rsid="001a9ee3"/>
    </style:style>
    <style:style style:name="T19" style:family="text">
      <style:text-properties style:font-name="Liberation Serif" officeooo:rsid="00365682"/>
    </style:style>
    <style:style style:name="T20" style:family="text">
      <style:text-properties style:font-name="Liberation Serif" fo:font-size="20pt" style:font-size-asian="20pt" style:font-size-complex="20pt"/>
    </style:style>
    <style:style style:name="T21" style:family="text">
      <style:text-properties officeooo:rsid="001febcf"/>
    </style:style>
    <style:style style:name="T22" style:family="text">
      <style:text-properties officeooo:rsid="0021c773"/>
    </style:style>
    <style:style style:name="T2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ee3" style:font-size-asian="12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75a" style:font-size-asian="12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b09" style:font-size-asian="12pt" style:font-style-asian="normal" style:font-weight-asian="normal" style:font-size-complex="12pt" style:text-emphasize="none"/>
    </style:style>
    <style:style style:name="T2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8" style:family="text">
      <style:text-properties officeooo:rsid="0028a75a"/>
    </style:style>
    <style:style style:name="T29" style:family="text">
      <style:text-properties fo:font-variant="normal" fo:text-transform="none" fo:color="#444a5a" loext:opacity="100%" fo:letter-spacing="normal"/>
    </style:style>
    <style:style style:name="T30" style:family="text">
      <style:text-properties fo:font-variant="normal" fo:text-transform="none" fo:color="#444a5a" loext:opacity="100%" fo:letter-spacing="normal" officeooo:rsid="002b42e8"/>
    </style:style>
    <style:style style:name="T31" style:family="text">
      <style:text-properties officeooo:rsid="002cc85c"/>
    </style:style>
    <style:style style:name="T32" style:family="text">
      <style:text-properties officeooo:rsid="002f2cd2"/>
    </style:style>
    <style:style style:name="T33" style:family="text">
      <style:text-properties officeooo:rsid="003424c0"/>
    </style:style>
    <style:style style:name="T34" style:family="text">
      <style:text-properties officeooo:rsid="0035366d"/>
    </style:style>
    <style:style style:name="T35" style:family="text">
      <style:text-properties officeooo:rsid="0039b5a8"/>
    </style:style>
    <style:style style:name="T36" style:family="text">
      <style:text-properties officeooo:rsid="003b30a5"/>
    </style:style>
    <style:style style:name="T37" style:family="text">
      <style:text-properties officeooo:rsid="00403fc1"/>
    </style:style>
    <style:style style:name="T38" style:family="text">
      <style:text-properties officeooo:rsid="00446f2a"/>
    </style:style>
    <style:style style:name="T39" style:family="text">
      <style:text-properties officeooo:rsid="0045c2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P2">Zeichen</text:p>
      <text:p text:style-name="P7"/>
      <text:p text:style-name="P7"/>
      <text:p text:style-name="P8">Strumming</text:p>
      <text:p text:style-name="P7"/>
      <text:p text:style-name="P7">↓ ↓ ↑ <text:s/>| <text:s/>↓ ↑ ↓ ↑</text:p>
      <text:p text:style-name="P7"/>
      <text:p text:style-name="P7"/>
      <text:p text:style-name="P7">1 <text:s text:c="4"/>2 <text:s text:c="4"/>3 <text:s text:c="4"/>4</text:p>
      <text:p text:style-name="P7">↓ <text:s/>↓ <text:s/>↑ <text:s text:c="2"/>↓ <text:s/>↑ <text:s/>↓ <text:s/>↑</text:p>
      <text:p text:style-name="P7"/>
      <text:p text:style-name="P7"/>
      <text:p text:style-name="P9">❗<text:tab/><text:span text:style-name="T38">Ausrufezeichen</text:span></text:p>
      <text:p text:style-name="P9"><draw:frame draw:style-name="fr2" draw:name="Bild3" text:anchor-type="char" svg:x="-0.093cm" svg:y="0.307cm" svg:width="0.7cm" svg:height="0.75cm" draw:z-index="1"><draw:image xlink:href="Pictures/10000000000000AE000000BA6428F10425F0D8DD.png" xlink:type="simple" xlink:show="embed" xlink:actuate="onLoad" draw:mime-type="image/png"/></draw:frame></text:p>
      <text:p text:style-name="P9"><text:tab/><text:span text:style-name="T39">Auto</text:span></text:p>
      <text:p text:style-name="Standard"/>
      <text:p text:style-name="Standard">🟢<text:tab/><text:span text:style-name="T34">Ball</text:span></text:p>
      <text:p text:style-name="Standard"/>
      <text:p text:style-name="Standard">💡<text:tab/><text:span text:style-name="T37">Birne</text:span></text:p>
      <text:p text:style-name="Standard"/>
      <text:p text:style-name="P19">📚<text:tab/><text:span text:style-name="T31">Bücher</text:span></text:p>
      <text:p text:style-name="Standard"/>
      <text:p text:style-name="P13"><text:span text:style-name="Source_20_Text"><text:span text:style-name="T10">✦ <text:tab/>Detail</text:span></text:span></text:p>
      <text:p text:style-name="P3">💻<text:tab/><text:span text:style-name="T3">Digitale-Technik</text:span></text:p>
      <text:p text:style-name="P24">🌍<text:tab/><text:span text:style-name="T2">Erde</text:span> <text:s text:c="3"/></text:p>
      <text:p text:style-name="P24"/>
      <text:p text:style-name="P26">👍<text:tab/>👌<text:tab/>👇 <text:span text:style-name="T32">Finger</text:span></text:p>
      <text:p text:style-name="P22"/>
      <text:p text:style-name="P25">⚡️ <text:tab/><text:span text:style-name="T36">gefährlich, e</text:span><text:span text:style-name="T35">mpfindlich</text:span></text:p>
      <text:p text:style-name="P22"/>
      <text:p text:style-name="P22">💡<text:tab/><text:span text:style-name="T33">Glühbirne</text:span></text:p>
      <text:p text:style-name="P22"/>
      <text:p text:style-name="P14"><text:span text:style-name="Source_20_Text"><text:span text:style-name="T10">★ <text:tab/>Hauptkapitel / </text:span></text:span><text:span text:style-name="Source_20_Text"><text:span text:style-name="T11">Unicode</text:span></text:span></text:p>
      <text:p text:style-name="P14"><text:span text:style-name="Source_20_Text"/></text:p>
      <text:p text:style-name="P14"><text:span text:style-name="Source_20_Text"><text:span text:style-name="T11">&gt; <text:tab/>Hinweis</text:span></text:span></text:p>
      <text:p text:style-name="P14"><text:span text:style-name="Source_20_Text"/></text:p>
      <text:p text:style-name="P13"><text:span text:style-name="Source_20_Text"><text:span text:style-name="T10">---<text:tab/></text:span></text:span><text:span text:style-name="Source_20_Text"><text:span text:style-name="T11">Horizpontale Trennlinien</text:span></text:span></text:p>
      <text:p text:style-name="P13"><text:span text:style-name="Source_20_Text"><text:span text:style-name="T11">📎<text:tab/></text:span></text:span><text:span text:style-name="Source_20_Text"><text:span text:style-name="T13">Klammer</text:span></text:span></text:p>
      <text:p text:style-name="P3"><text:span text:style-name="T9">⚔️<text:tab/></text:span><text:span text:style-name="T18">Macht</text:span></text:p>
      <text:p text:style-name="P3"><text:span text:style-name="T18">📉<text:tab/></text:span><text:span text:style-name="T19">Nachteil</text:span></text:p>
      <text:p text:style-name="P23"><text:span text:style-name="T23">√<text:tab/>✅<text:tab/></text:span><text:span text:style-name="T24">okay</text:span></text:p>
      <text:p text:style-name="P4"><text:soft-page-break/></text:p>
      <text:p text:style-name="P18">➡️<text:tab/><text:span text:style-name="Source_20_Text"><text:span text:style-name="T20">→</text:span></text:span><text:span text:style-name="Source_20_Text"><text:span text:style-name="T9"> </text:span></text:span><text:tab/><text:span text:style-name="T4">Pfeil</text:span><text:span text:style-name="T28">e</text:span></text:p>
      <text:p text:style-name="P18"><draw:frame draw:style-name="fr1" draw:name="Bild2" text:anchor-type="as-char" svg:width="0.529cm" svg:height="0.529cm" draw:z-index="2"><draw:image xlink:href="Pictures/10000280000003D3000003D345A18774B9184706.svg" xlink:type="simple" xlink:show="embed" xlink:actuate="onLoad" draw:mime-type="image/svg+xml"/><draw:image xlink:href="Pictures/10000001000000250000002584AA534C1F59157C.png" xlink:type="simple" xlink:show="embed" xlink:actuate="onLoad" draw:mime-type="image/png"/><svg:title>📌</svg:title></draw:frame><text:span text:style-name="T29"><text:s/><text:tab/></text:span><text:span text:style-name="T30">Pin</text:span></text:p>
      <text:p text:style-name="P20"><text:span text:style-name="Source_20_Text"><text:span text:style-name="T25">·<text:tab/></text:span></text:span><text:span text:style-name="Source_20_Text"><text:span text:style-name="T27">•</text:span></text:span><text:span text:style-name="Source_20_Text"><text:span text:style-name="T25"><text:tab/></text:span></text:span><text:span text:style-name="Source_20_Text"><text:span text:style-name="T26">Punkte</text:span></text:span><text:span text:style-name="Source_20_Text"><text:span text:style-name="T10"><text:tab/></text:span></text:span></text:p>
      <text:p text:style-name="P20"><text:span text:style-name="Source_20_Text"/></text:p>
      <text:p text:style-name="P30"><text:span text:style-name="Emphasis"><text:span text:style-name="T10">✂️<text:tab/></text:span></text:span><text:span text:style-name="Emphasis"><text:span text:style-name="T17">Schere</text:span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>✍️<text:tab/></text:span></text:span><text:span text:style-name="Source_20_Text"><text:span text:style-name="T14">Schreiben</text:span></text:span></text:p>
      <text:p text:style-name="P20"><text:span text:style-name="Source_20_Text"/></text:p>
      <text:p text:style-name="P21"><text:span text:style-name="Source_20_Text"><text:span text:style-name="T10">😅<text:tab/></text:span></text:span><text:span text:style-name="Source_20_Text"><text:span text:style-name="T12">🙂<text:tab/>😊<text:tab/>Smile</text:span></text:span></text:p>
      <text:p text:style-name="P21"><text:span text:style-name="Source_20_Text"/></text:p>
      <text:p text:style-name="P21"><text:span text:style-name="Source_20_Text"><text:span text:style-name="T12">✳️<text:tab/></text:span></text:span><text:span text:style-name="Source_20_Text"><text:span text:style-name="T15">*<text:tab/>Sterne</text:span></text:span></text:p>
      <text:p text:style-name="P21"><text:span text:style-name="Source_20_Text"><text:span text:style-name="T15">🕊️ </text:span></text:span></text:p>
      <text:p text:style-name="P14"><text:span text:style-name="Source_20_Text"/></text:p>
      <text:p text:style-name="P6"><text:tab/>Trennlinie</text:p>
      <text:h text:style-name="P5" text:outline-level="3"><text:span text:style-name="T5">⚖️<text:tab/></text:span><text:span text:style-name="T8">Waage</text:span></text:h>
      <text:p text:style-name="P16"><text:span text:style-name="T5">📈<text:tab/></text:span><text:span text:style-name="T6">Wachstum</text:span></text:p>
      <text:p text:style-name="P16"><text:span text:style-name="T6">⚙️<text:tab/></text:span><text:span text:style-name="T7">Zahnrad</text:span></text:p>
      <text:p text:style-name="P16"><text:line-break/><draw:frame draw:style-name="fr1" draw:name="Bild1" text:anchor-type="as-char" svg:width="0.635cm" svg:height="0.635cm" draw:z-index="0"><draw:image xlink:href="Pictures/10000233000003B9000003B9BACDF059D4E5A028.svg" xlink:type="simple" xlink:show="embed" xlink:actuate="onLoad" draw:mime-type="image/svg+xml"/><draw:image xlink:href="Pictures/100000010000002400000024866ED9AB54CF082A.png" xlink:type="simple" xlink:show="embed" xlink:actuate="onLoad" draw:mime-type="image/png"/><svg:title>👉</svg:title></draw:frame> <text:tab/><text:span text:style-name="T1">Zeigefinger</text:span></text:p>
      <text:p text:style-name="P15">👉<text:tab/><text:span text:style-name="T1">Zeigefinger</text:span></text:p>
      <text:p text:style-name="P15">🗞️</text:p>
      <text:p text:style-name="Standard"/>
      <text:p text:style-name="Standard"/>
      <text:p text:style-name="P17">🦆 <text:tab/><text:span text:style-name="T21">Ente <text:tab/></text:span><text:span text:style-name="Source_20_Text">:duck:</text:span></text:p>
      <text:p text:style-name="Standard"/>
      <text:p text:style-name="Standard">🛳️🛳️ <text:s/><text:tab/><text:span text:style-name="T22">Schiff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estaltungstipps</text:p>
      <text:p text:style-name="Standard"/>
      <text:h text:style-name="Heading_20_3" text:outline-level="3">1. Horizontale Trennlinien</text:h>
      <text:p text:style-name="P11"><text:span text:style-name="Source_20_Text">---</text:span></text:p>
      <text:p text:style-name="Text_20_body">→ ergibt eine dünne Linie zwischen Abschnitten.<text:line-break/>Gut, um Prolog, Aufklärung, Krisenfelder, Epilog voneinander zu trennen.</text:p>
      <text:p text:style-name="Horizontal_20_Line"/>
      <text:h text:style-name="Heading_20_3" text:outline-level="3"><text:soft-page-break/>2. Symbole statt Bindestrichen</text:h>
      <text:p text:style-name="Text_20_body">Statt <text:span text:style-name="Source_20_Text">-</text:span> oder <text:span text:style-name="Source_20_Text">•</text:span> kannst du Unicode-Symbole nutzen, die etwas edler wirken:</text:p>
      <text:p text:style-name="P10"><text:span text:style-name="Source_20_Text">★ Hauptkapitel</text:span></text:p>
      <text:p text:style-name="P10"><text:span text:style-name="Source_20_Text">→ Unterpunkt</text:span></text:p>
      <text:p text:style-name="P11"><text:span text:style-name="Source_20_Text">✦ Detail</text:span></text:p>
      <text:p text:style-name="Text_20_body">Beispiel:</text:p>
      <text:p text:style-name="P10"><text:span text:style-name="Source_20_Text">★ 3. Aufklärung 2.0 <text:s/></text:span></text:p>
      <text:p text:style-name="P10"><text:span text:style-name="Source_20_Text">→ 3.1 Institutionen &amp; internationale Ordnung <text:s/></text:span></text:p>
      <text:p text:style-name="P10"><text:span text:style-name="Source_20_Text">✦ Exekutivkrise <text:s/></text:span></text:p>
      <text:p text:style-name="P11"><text:span text:style-name="Source_20_Text">✦ Bürokratieabbau</text:span></text:p>
      <text:p text:style-name="Horizontal_20_Line"/>
      <text:h text:style-name="Heading_20_3" text:outline-level="3">3. Fettdruck für Hauptpunkte</text:h>
      <text:p text:style-name="P10"><text:span text:style-name="Source_20_Text">**1. Prolog: Hybris** <text:s/></text:span></text:p>
      <text:p text:style-name="P11"><text:span text:style-name="Source_20_Text"><text:s text:c="3"/>Hybris als roter Faden</text:span></text:p>
      <text:p text:style-name="Text_20_body">→ hebt Hauptkapitel hervor, Unterpunkte bleiben schlicht.</text:p>
      <text:p text:style-name="Horizontal_20_Line"/>
      <text:h text:style-name="Heading_20_3" text:outline-level="3">4. Kursivschrift für Untertitel</text:h>
      <text:p text:style-name="P10"><text:span text:style-name="Source_20_Text">**3. Aufklärung 2.0 – die Methode** <text:s/></text:span></text:p>
      <text:p text:style-name="P11"><text:span text:style-name="Source_20_Text">*Lernend, kritisch, verbindend*</text:span></text:p>
      <text:p text:style-name="Text_20_body">→ sorgt für optische Unterscheidung, ohne viel Aufwand.</text:p>
      <text:p text:style-name="Horizontal_20_Line"/>
      <text:h text:style-name="Heading_20_3" text:outline-level="3">5. „Kästen“ für wichtige Hinweise</text:h>
      <text:p text:style-name="Text_20_body">Mit <text:span text:style-name="Source_20_Text">&gt;</text:span> kannst du Zitate / Kästen erzeugen:</text:p>
      <text:p text:style-name="P10"><text:span text:style-name="Source_20_Text">&gt; Hinweis: Diese Roadmap ist ein lebendes Dokument. </text:span></text:p>
      <text:p text:style-name="P11"><text:span text:style-name="Source_20_Text">&gt; Sie wird laufend ergänzt, wenn neue Kapitel erscheinen.</text:span></text:p>
      <text:p text:style-name="Text_20_body">→ wird eingerückt und grau hinterlegt angezeigt. Perfekt für Meta-Hinweise.</text:p>
      <text:p text:style-name="Horizontal_20_Line"/>
      <text:h text:style-name="Heading_20_3" text:outline-level="3">6. Optionale Farbtupfer (über Emojis)</text:h>
      <text:p text:style-name="Text_20_body">Da <text:span text:style-name="Emphasis">listed.to</text:span> keine Farben kennt, helfen Emojis:<text:line-break/>🌍 für Klima, ⚔️ für Konflikte, 💻 für Digitalisierung, ⚖️ für Gerechtigkeit.</text:p>
      <text:p text:style-name="Text_20_body">Beispiel:</text:p>
      <text:p text:style-name="P10"><text:span text:style-name="Source_20_Text">4.1 🌍 Klimakrise &amp; Ökologie <text:s/></text:span></text:p>
      <text:p text:style-name="P10"><text:span text:style-name="Source_20_Text">4.2 ⚔️ Konflikte, Sicherheit &amp; digitale Macht <text:s/></text:span></text:p>
      <text:p text:style-name="P10"><text:span text:style-name="Source_20_Text">4.3 💻 Digitalisierung &amp; Technik <text:s/></text:span></text:p>
      <text:p text:style-name="P11"><text:span text:style-name="Source_20_Text">4.4 ⚖️ Gerechtigkeit &amp; Zusammenhalt</text:span></text:p>
      <text:p text:style-name="Horizontal_20_Line"/>
      <text:p text:style-name="Text_20_body"><text:soft-page-break/>👉 Kombination, die ich dir empfehlen würde:</text:p>
      <text:list text:style-name="L1">
        <text:list-item>
          <text:p text:style-name="P28"><text:span text:style-name="Strong_20_Emphasis">Fettdruck für Hauptpunkte</text:span>,</text:p>
        </text:list-item>
        <text:list-item>
          <text:p text:style-name="P28"><text:span text:style-name="Strong_20_Emphasis">Symbole (→ / ✦)</text:span> für Unterpunkte,</text:p>
        </text:list-item>
        <text:list-item>
          <text:p text:style-name="P28"><text:span text:style-name="Strong_20_Emphasis">horizontale Linie </text:span><text:span text:style-name="Strong_20_Emphasis"><text:span text:style-name="Source_20_Text">---</text:span></text:span> zwischen großen Blöcken,</text:p>
        </text:list-item>
        <text:list-item>
          <text:p text:style-name="P28">und sparsam eingesetzte Emojis 🌍⚔️💻⚖️ für die Krisenfelder.</text:p>
        </text:list-item>
      </text:list>
      <text:p text:style-name="Standard"/>
      <text:p text:style-name="Standard"/>
      <text:p text:style-name="P12">womit machst Du den Strich zwischen mount und grep bei 1.?</text:p>
      <text:h text:style-name="Heading_20_6" text:outline-level="6">ChatGPT:</text:h>
      <text:p text:style-name="Text_20_body">Das ist einfach der <text:span text:style-name="Strong_20_Emphasis">Pipe-Operator</text:span> (<text:span text:style-name="Source_20_Text">|</text:span>) – kein Strichminus 😊</text:p>
      <text:p text:style-name="Text_20_body">Konkret:</text:p>
      <text:p text:style-name="P11"><text:span text:style-name="Source_20_Text">mount | grep /media</text:span></text:p>
      <text:list text:style-name="L2">
        <text:list-item>
          <text:p text:style-name="P29"><text:span text:style-name="Source_20_Text">mount</text:span> listet alle eingehängten Geräte und ihre Optionen.</text:p>
        </text:list-item>
        <text:list-item>
          <text:p text:style-name="P29"><text:span text:style-name="Source_20_Text">|</text:span> (Pipe) leitet die Ausgabe an den nächsten Befehl weiter.</text:p>
        </text:list-item>
        <text:list-item>
          <text:p text:style-name="P29"><text:span text:style-name="Source_20_Text">grep /media</text:span> filtert die Zeilen, in denen <text:span text:style-name="Source_20_Text">/media</text:span> vorkommt (also deine eingehängten Festplatten/USBs).</text:p>
        </text:list-item>
      </text:list>
      <text:p text:style-name="Text_20_body">👉 Das ist also ein senkrechter Strich (Pipe), nicht der Bindestrich. Auf einer deutschen Tastatur findest du ihn meist mit <text:span text:style-name="Strong_20_Emphasis">Alt Gr + &lt;</text:span> (links neben der Taste "Y"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06:26:08.882765041</meta:creation-date>
    <dc:date>2026-01-26T07:11:41.606805508</dc:date>
    <meta:editing-duration>PT4H6M33S</meta:editing-duration>
    <meta:editing-cycles>44</meta:editing-cycles>
    <meta:generator>LibreOffice/7.4.7.2$Linux_X86_64 LibreOffice_project/40$Build-2</meta:generator>
    <meta:document-statistic meta:table-count="0" meta:image-count="3" meta:object-count="0" meta:page-count="4" meta:paragraph-count="89" meta:word-count="404" meta:character-count="2461" meta:non-whitespace-character-count="2086"/>
  </office:meta>
</office:document-meta>
</file>